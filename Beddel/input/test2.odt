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eading 1: Strategy Update</text:p>
      <text:p text:style-name="Standard"/>
      <text:p text:style-name="Standard">Acme Corporation plans to expand into new market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12T18:35:21.077728000</meta:creation-date>
    <dc:date>2025-07-12T18:35:40.531219000</dc:date>
    <meta:editing-duration>PT19S</meta:editing-duration>
    <meta:editing-cycles>1</meta:editing-cycles>
    <meta:document-statistic meta:table-count="0" meta:image-count="0" meta:object-count="0" meta:page-count="1" meta:paragraph-count="2" meta:word-count="12" meta:character-count="76" meta:non-whitespace-character-count="66"/>
    <meta:generator>LibreOffice/25.2.4.3$MacOSX_AARCH64 LibreOffice_project/33e196637044ead23f5c3226cde09b47731f7e27</meta:generator>
  </office:meta>
</office:document-meta>
</file>